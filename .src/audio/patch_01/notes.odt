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'Helvetica Neue', sans-serif"/>
  </office:font-face-decls>
  <office:automatic-styles>
    <style:style style:name="P1" style:family="paragraph" style:parent-style-name="Standard">
      <style:text-properties fo:color="#000000" loext:opacity="100%" style:font-name="Segoe UI" fo:font-size="11pt"/>
    </style:style>
    <style:style style:name="P2" style:family="paragraph" style:parent-style-name="Standard">
      <style:text-properties fo:color="#000000" loext:opacity="100%" style:font-name="Segoe UI" fo:font-size="11pt" fo:background-color="#ffffff"/>
    </style:style>
    <style:style style:name="T1" style:family="text">
      <style:text-properties fo:font-weight="bold"/>
    </style:style>
    <style:style style:name="T2" style:family="text">
      <style:text-properties fo:color="#ed5c57" loext:opacity="100%"/>
    </style:style>
    <style:style style:name="T3" style:family="text">
      <style:text-properties fo:background-color="#ffffff" loext:char-shading-value="0"/>
    </style:style>
    <style:style style:name="T4" style:family="text">
      <style:text-properties fo:font-style="italic"/>
    </style:style>
    <style:style style:name="T5" style:family="text">
      <style:text-properties fo:font-style="italic" fo:background-color="#ffffff" loext:char-shading-value="0"/>
    </style:style>
    <style:style style:name="T6" style:family="text">
      <style:text-properties fo:color="#0c882a" loext:opacity="100%"/>
    </style:style>
    <style:style style:name="T7" style:family="text">
      <style:text-properties fo:color="#0c882a" loext:opacity="100%" fo:background-color="#ffffff" loext:char-shading-value="0"/>
    </style:style>
    <style:style style:name="T8" style:family="text">
      <style:text-properties fo:color="#c82613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've attached the updated audio file to this email and also updated it in the OneDrive link. As I was going through the script, I also rerecorded two lines to better fit the participant input:</text:p>
      <text:p text:style-name="P1"/>
      <text:p text:style-name="P1"><text:span text:style-name="T1">OLD: </text:span>"Now let’s go to Planet Stardust, press the <text:span text:style-name="T2">GO button</text:span> to get closer to finding Lucky!"</text:p>
      <text:p text:style-name="P1"><text:span text:style-name="T1">NEW: </text:span>"<text:span text:style-name="T3">Now let’s go to Planet Stardust, press the </text:span><text:span text:style-name="T7">green button</text:span><text:span text:style-name="T3"> to get closer to finding Lucky! </text:span><text:span text:style-name="T5">(file name: End_Task1.wav)</text:span></text:p>
      <text:p text:style-name="P2"/>
      <text:p text:style-name="P2"><text:span text:style-name="T1">OLD: </text:span>"Look, it’s Planet Stardust!  To use our spaceship to look around, press the <text:span text:style-name="T8">Landing</text:span> <text:span text:style-name="T8">Button</text:span>."</text:p>
      <text:p text:style-name="P2"><text:span text:style-name="T1">NEW: </text:span>"Look, it’s Planet Stardust!  To use our spaceship to look around, press the <text:span text:style-name="T6">green button</text:span>." <text:span text:style-name="T4">(file name: End_Task2.wav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9:33:38.190000000</meta:creation-date>
    <dc:date>2023-09-12T19:34:13.747000000</dc:date>
    <meta:editing-duration>PT36S</meta:editing-duration>
    <meta:editing-cycles>1</meta:editing-cycles>
    <meta:document-statistic meta:table-count="0" meta:image-count="0" meta:object-count="0" meta:page-count="1" meta:paragraph-count="5" meta:word-count="107" meta:character-count="624" meta:non-whitespace-character-count="520"/>
    <meta:generator>LibreOffice/7.5.4.2$Windows_X86_64 LibreOffice_project/36ccfdc35048b057fd9854c757a8b67ec53977b6</meta:generator>
  </office:meta>
</office:document-meta>
</file>